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4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ame i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<text:a xlink:href="https://www.youtube.com/watch?v=-8V3h3gEmHE" xlink:type="simple">https://www.youtube.com/watch?v=-8V3h3gEmHE</text:a></text:p>
          </table:table-cell>
          <table:table-cell table:style-name="ce1" office:value-type="string" calcext:value-type="string">
            <text:p>Alex Colovic </text:p>
          </table:table-cell>
          <table:table-cell office:value-type="string" calcext:value-type="string">
            <text:p>French</text:p>
          </table:table-cell>
          <table:table-cell table:style-name="ce2" office:value-type="time" office:time-value="PT00H29M06S" calcext:value-type="time">
            <text:p>00:29:06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<text:a xlink:href="https://www.youtube.com/watch?v=eGlOtE1ZG7A" xlink:type="simple">https://www.youtube.com/watch?v=eGlOtE1ZG7A</text:a></text:p>
          </table:table-cell>
          <table:table-cell table:style-name="ce1" office:value-type="string" calcext:value-type="string">
            <text:p>Alex Colovic </text:p>
          </table:table-cell>
          <table:table-cell office:value-type="string" calcext:value-type="string">
            <text:p>KIA</text:p>
          </table:table-cell>
          <table:table-cell table:style-name="ce3" office:value-type="time" office:time-value="PT00H21M06S" calcext:value-type="time">
            <text:p>00:21:06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<text:a xlink:href="https://www.youtube.com/watch?v=c1974-yHaGM" xlink:type="simple">https://www.youtube.com/watch?v=c1974-yHaGM</text:a></text:p>
          </table:table-cell>
          <table:table-cell table:style-name="ce1" office:value-type="string" calcext:value-type="string">
            <text:p>Alex Colovic </text:p>
          </table:table-cell>
          <table:table-cell office:value-type="string" calcext:value-type="string">
            <text:p>Grunfeld</text:p>
          </table:table-cell>
          <table:table-cell table:style-name="ce2" office:value-type="time" office:time-value="PT00H29M09S" calcext:value-type="time">
            <text:p>00:29:09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<text:a xlink:href="https://www.youtube.com/watch?v=H-kPh7ydcKM&amp;list=PLv5i0_OVqA8HGdohwcAOi9UCJPk3wyfJq&amp;index=4" xlink:type="simple">https://www.youtube.com/watch?v=H-kPh7ydcKM&amp;list=PLv5i0_OVqA8HGdohwcAOi9UCJPk3wyfJq&amp;index=4</text:a></text:p>
          </table:table-cell>
          <table:table-cell office:value-type="string" calcext:value-type="string">
            <text:p>ASMR Chess</text:p>
          </table:table-cell>
          <table:table-cell office:value-type="string" calcext:value-type="string">
            <text:p>Max Lange</text:p>
          </table:table-cell>
          <table:table-cell table:style-name="ce2" office:value-type="time" office:time-value="PT00H59M43S" calcext:value-type="time">
            <text:p>00:59:43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<text:a xlink:href="https://www.youtube.com/watch?v=dRV9MIBHGyQ" xlink:type="simple">https://www.youtube.com/watch?v=dRV9MIBHGyQ</text:a></text:p>
          </table:table-cell>
          <table:table-cell office:value-type="string" calcext:value-type="string">
            <text:p>hangingpawns</text:p>
          </table:table-cell>
          <table:table-cell office:value-type="string" calcext:value-type="string">
            <text:p>jaenich gambit</text:p>
          </table:table-cell>
          <table:table-cell table:style-name="ce3" office:value-type="time" office:time-value="PT00H17M40S" calcext:value-type="time">
            <text:p>00:17:4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<text:a xlink:href="https://www.youtube.com/watch?v=TF-1SdNsVEU" xlink:type="simple">https://www.youtube.com/watch?v=TF-1SdNsVEU</text:a></text:p>
          </table:table-cell>
          <table:table-cell table:style-name="ce1" office:value-type="string" calcext:value-type="string">
            <text:p><text:a xlink:href="https://www.youtube.com/@imkirillklyukin" xlink:type="simple">Chess coach IM </text:a> </text:p>
          </table:table-cell>
          <table:table-cell office:value-type="string" calcext:value-type="string">
            <text:p>white common mistakes/italian game</text:p>
          </table:table-cell>
          <table:table-cell table:style-name="ce3" office:value-type="time" office:time-value="PT00H08M44S" calcext:value-type="time">
            <text:p>00:08:44</text:p>
          </table:table-cell>
          <table:table-cell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<text:a xlink:href="https://www.youtube.com/watch?v=J_Kkr4s7ANU" xlink:type="simple">https://www.youtube.com/watch?v=J_Kkr4s7ANU</text:a></text:p>
          </table:table-cell>
          <table:table-cell office:value-type="string" calcext:value-type="string">
            <text:p>chess vibes</text:p>
          </table:table-cell>
          <table:table-cell office:value-type="string" calcext:value-type="string">
            <text:p>grand prix</text:p>
          </table:table-cell>
          <table:table-cell table:style-name="ce3" office:value-type="time" office:time-value="PT00H21M32S" calcext:value-type="time">
            <text:p>00:21:32</text:p>
          </table:table-cell>
          <table:table-cell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<text:a xlink:href="https://www.youtube.com/watch?v=o4qHgO0DL8I" xlink:type="simple">https://www.youtube.com/watch?v=o4qHgO0DL8I</text:a></text:p>
          </table:table-cell>
          <table:table-cell office:value-type="string" calcext:value-type="string">
            <text:p>agadmator</text:p>
          </table:table-cell>
          <table:table-cell office:value-type="string" calcext:value-type="string">
            <text:p>marshall attack</text:p>
          </table:table-cell>
          <table:table-cell table:style-name="ce2" office:value-type="time" office:time-value="PT00H28M42S" calcext:value-type="time">
            <text:p>00:28:42</text:p>
          </table:table-cell>
          <table:table-cell office:value-type="string" calcext:value-type="string">
            <text:p>full_game, inccludes long endgam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https://www.youtube.com/watch?v=MEtEWSyZOEw</text:p>
          </table:table-cell>
          <table:table-cell office:value-type="string" calcext:value-type="string">
            <text:p>the chess giant</text:p>
          </table:table-cell>
          <table:table-cell office:value-type="string" calcext:value-type="string">
            <text:p>Nimzovitsch</text:p>
          </table:table-cell>
          <table:table-cell table:style-name="ce3" office:value-type="time" office:time-value="PT00H11M41S" calcext:value-type="time">
            <text:p>00:11:41</text:p>
          </table:table-cell>
          <table:table-cell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<text:a xlink:href="https://www.youtube.com/watch?v=4OWCUVUuN3k" xlink:type="simple">https://www.youtube.com/watch?v=4OWCUVUuN3k</text:a></text:p>
          </table:table-cell>
          <table:table-cell office:value-type="string" calcext:value-type="string">
            <text:p>the chess website</text:p>
          </table:table-cell>
          <table:table-cell office:value-type="string" calcext:value-type="string">
            <text:p>Sicilian trap</text:p>
          </table:table-cell>
          <table:table-cell table:style-name="ce3" office:value-type="time" office:time-value="PT00H08M25S" calcext:value-type="time">
            <text:p>00:08:25</text:p>
          </table:table-cell>
          <table:table-cell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<text:a xlink:href="https://www.youtube.com/watch?v=nkhPEbFY5BM" xlink:type="simple">https://www.youtube.com/watch?v=nkhPEbFY5BM</text:a></text:p>
          </table:table-cell>
          <table:table-cell office:value-type="string" calcext:value-type="string">
            <text:p>Saint Louis chess club</text:p>
          </table:table-cell>
          <table:table-cell office:value-type="string" calcext:value-type="string">
            <text:p>QGD Tartakower</text:p>
          </table:table-cell>
          <table:table-cell table:style-name="ce2" office:value-type="time" office:time-value="PT00H59M30S" calcext:value-type="time">
            <text:p>00:59:30</text:p>
          </table:table-cell>
          <table:table-cell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<text:a xlink:href="https://www.youtube.com/watch?v=q-Mzn45iCeg" xlink:type="simple">https://www.youtube.com/watch?v=q-Mzn45iCeg</text:a></text:p>
          </table:table-cell>
          <table:table-cell office:value-type="string" calcext:value-type="string">
            <text:p>Harikrishna / chessable</text:p>
          </table:table-cell>
          <table:table-cell office:value-type="string" calcext:value-type="string">
            <text:p>Sicilian Taimanov</text:p>
          </table:table-cell>
          <table:table-cell table:style-name="ce3" office:value-type="time" office:time-value="PT01H31M37S" calcext:value-type="time">
            <text:p>01:31:37</text:p>
          </table:table-cell>
          <table:table-cell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<text:a xlink:href="https://www.youtube.com/watch?v=j2C09bPW1SY" xlink:type="simple">https://www.youtube.com/watch?v=j2C09bPW1SY</text:a></text:p>
          </table:table-cell>
          <table:table-cell office:value-type="string" calcext:value-type="string">
            <text:p>Nutty chess tips</text:p>
          </table:table-cell>
          <table:table-cell office:value-type="string" calcext:value-type="string">
            <text:p>Owens atttack</text:p>
          </table:table-cell>
          <table:table-cell table:style-name="ce3" office:value-type="time" office:time-value="PT00H12M47S" calcext:value-type="time">
            <text:p>00:12:47</text:p>
          </table:table-cell>
          <table:table-cell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<text:a xlink:href="https://www.youtube.com/watch?v=JX00-qr7eVE" xlink:type="simple">https://www.youtube.com/watch?v=JX00-qr7eVE</text:a></text:p>
          </table:table-cell>
          <table:table-cell office:value-type="string" calcext:value-type="string">
            <text:p>GM Neiskans</text:p>
          </table:table-cell>
          <table:table-cell office:value-type="string" calcext:value-type="string">
            <text:p>Karlsbad</text:p>
          </table:table-cell>
          <table:table-cell table:style-name="ce3" office:value-type="time" office:time-value="PT00H26M44S" calcext:value-type="time">
            <text:p>00:26:44</text:p>
          </table:table-cell>
          <table:table-cell office:value-type="string" calcext:value-type="string">
            <text:p>full game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t" fo:country="E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t" fo:country="E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oolestiili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oolestiilid_20_1" draw:display-name="Noolestiilid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Lehekülg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 style:data-style-name="N2" text:time-value="22:45:37.640351200">00:00:00</text:time></text:p>
        </style:region-right>
      </style:header>
      <style:header-left style:display="false"/>
      <style:header-first style:display="false"/>
      <style:footer>
        <text:p>Lehekülg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5:15:23.434735600</meta:creation-date>
    <dc:date>2025-12-13T22:47:18.587643300</dc:date>
    <meta:editing-duration>P14DT20H49M</meta:editing-duration>
    <meta:editing-cycles>9</meta:editing-cycles>
    <meta:generator>LibreOffice/25.8.2.2$Windows_X86_64 LibreOffice_project/d401f2107ccab8f924a8e2df40f573aab7605b6f</meta:generator>
    <meta:document-statistic meta:table-count="1" meta:cell-count="77" meta:object-count="0"/>
  </office:meta>
</office:document-meta>
</file>